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irst_20_line_20_indent">
      <style:paragraph-properties fo:margin-left="0cm" fo:margin-right="0cm" fo:text-indent="0cm" style:auto-text-indent="false"/>
      <style:text-properties officeooo:paragraph-rsid="0077fdf3"/>
    </style:style>
    <style:style style:name="P8" style:family="paragraph" style:parent-style-name="First_20_line_20_indent" style:master-page-name="First_20_Page">
      <style:paragraph-properties fo:margin-left="0cm" fo:margin-right="0cm" fo:text-indent="0cm" style:auto-text-indent="false" style:page-number="auto"/>
      <style:text-properties fo:font-size="16pt" fo:font-weight="bold" officeooo:paragraph-rsid="0077fdf3" style:font-size-asian="16pt" style:font-weight-asian="bold" style:font-size-complex="16pt" style:font-weight-complex="bold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актическая работа: Работа с телевизором "Эмеральд/Изумруд". Диагностика и обслуживание.</text:p>
      <text:p text:style-name="P6"/>
      <text:p text:style-name="P6"><text:span text:style-name="T2">Цель работы: Изучить устройство, освоить базовые приемы диагностики неисправностей и правила безопасной работы с телевизорами бренда (на примере современных моделей и ретро-аппаратов).</text:span></text:p>
      <text:p text:style-name="P6"/>
      <text:p text:style-name="P6">Ход работы (вариативно, в зависимости от типа ТВ)</text:p>
      <text:p text:style-name="P6"/>
      <text:p text:style-name="P6">Модуль 1. Современный телевизор "Эмеральд" (ЖК, Smart TV)</text:p>
      <text:p text:style-name="P6"/>
      <text:p text:style-name="P6">Это актуальные модели, которые поставляются в школы по нацпроекту "Образование" (входят в комплект "Медиакласс DIGIS") . Например, модель KD75U-PYAB/RU имеет диагональ 75", разрешение 4K, Smart TV, Wi-Fi, Bluetooth и цифровые тюнеры DVB-T2/C/S2 .</text:p>
      <text:p text:style-name="P6"/>
      <text:p text:style-name="P6">Задание 1.1. Подключение и настройка</text:p>
      <text:p text:style-name="P6"/>
      <text:p text:style-name="P6">1. Подключите питание и внешние устройства (ноутбук/документ-камера) через HDMI.</text:p>
      <text:p text:style-name="P6">2. Подключитесь к сети Wi-Fi через меню "Настройки" → "Сеть".</text:p>
      <text:p text:style-name="P6">3. Вопрос: Какие разъемы на задней панели отвечают за подключение к интернету и трансляцию экрана? </text:p>
      <text:p text:style-name="P6"><text:s text:c="3"/>· Ответ: За интернет отвечают Wi-Fi (беспроводной) и LAN (проводной Ethernet). За трансляцию изображения — HDMI и, возможно, Miracast (беспроводной протокол) .</text:p>
      <text:p text:style-name="P6"/>
      <text:p text:style-name="P6">Задание 1.2. Сброс до заводских настроек</text:p>
      <text:p text:style-name="P6"/>
      <text:p text:style-name="P6">1. Найти в меню пункт "Сброс" или "Восстановление".</text:p>
      <text:p text:style-name="P6">2. Вопрос: Когда требуется полный сброс, и как он выполняется на устройствах с Android TV?</text:p>
      <text:p text:style-name="P6"><text:s text:c="3"/>· Ответ: Сброс нужен при "зависаниях", продаже ТВ или если забыли PIN-код. Путь обычно: Настройки → Общие → Сброс → Стереть все данные (или через "Настройки → Устройство → Сброс") . Это удалит все учетные записи и установленные приложения.</text:p>
      <text:p text:style-name="P6"/>
      <text:p text:style-name="P6">Модуль 2. Винтажный телевизор "Изумруд" (ламповый, кинескопный)</text:p>
      <text:p text:style-name="P6"/>
      <text:p text:style-name="P6">В кабинетах физики или в музеях могут сохраниться легендарные модели: "Изумруд-1" (1970 г.), "Изумруд-202" (1969 г.), "Изумруд-209" (1977 г.) и другие . Это совсем другая техника!</text:p>
      <text:p text:style-name="P6"/>
      <text:p text:style-name="P7"><text:soft-page-break/>Критическое предупреждение: В таких телевизорах напряжение на аноде кинескопа достигает 15–25 кВ (тысяч вольт)! Даже после отключения от сети высоковольтный конденсатор и кинескоп сохраняют смертельно опасный заряд . Работать можно только под наблюдением преподавателя и с использованием разрядной резисторной штанги.</text:p>
      <text:p text:style-name="P6"/>
      <text:p text:style-name="P6">Задание 2.1. Визуальная диагностика</text:p>
      <text:p text:style-name="P6"/>
      <text:p text:style-name="P6">1. Отключите ТВ от розетки. Разрядите кинескоп.</text:p>
      <text:p text:style-name="P6">2. Снимите заднюю крышку (у "Изумруд-1" она алюминиевая) .</text:p>
      <text:p text:style-name="P6">3. Осмотрите шасси. Обратите внимание на лампы в панельках (их там до 17 штук), на трансформатор строчной развертки (ТВС) и на большой трансформатор питания .</text:p>
      <text:p text:style-name="P6">4. Вопрос: Почему в старых телевизорах часто помогал "стук по корпусу"?</text:p>
      <text:p text:style-name="P6"><text:s text:c="3"/>· Ответ: Лампы в панельках со временем нагревались, контакты окислялись и теряли соединение. Удар на мгновение восстанавливал контакт, но это не лечение, а диагностический признак .</text:p>
      <text:p text:style-name="P6"/>
      <text:p text:style-name="P6">Задание 2.2. Чтение схемы и поиск неисправности</text:p>
      <text:p text:style-name="P6"/>
      <text:p text:style-name="P6">1. Найдите на принципиальной схеме блок питания и выходные транзисторы горизонтальной развертки (обычно на радиаторах) .</text:p>
      <text:p text:style-name="P6">2. Вопрос: Телевизор гудит, все лампы горят, но кинескоп не запускается (нет изображения). В чем первая причина?</text:p>
      <text:p text:style-name="P6"><text:s text:c="3"/>· Ответ: Самая вероятная причина — неисправность блока горизонтальной развертки или выход из строя мощных транзисторов в этом блоке. Напряжение на кинескоп не поступает, хотя блок питания жив (лампы накала горят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08:54:12.841961650</meta:creation-date>
    <dc:title>Default</dc:title>
    <meta:editing-cycles>2</meta:editing-cycles>
    <meta:editing-duration>PT3M40S</meta:editing-duration>
    <meta:generator>LibreOffice/7.5.6.2$Linux_X86_64 LibreOffice_project/50$Build-2</meta:generator>
    <dc:date>2026-06-18T08:57:53.188982435</dc:date>
    <meta:document-statistic meta:table-count="1" meta:image-count="0" meta:object-count="0" meta:page-count="2" meta:paragraph-count="37" meta:word-count="457" meta:character-count="3179" meta:non-whitespace-character-count="2745"/>
  </office:meta>
</office:document-meta>
</file>