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style:page-number="auto"/>
      <style:text-properties fo:font-size="16pt" fo:font-weight="bold" officeooo:paragraph-rsid="0077fdf3" style:font-size-asian="16pt" style:font-weight-asian="bold" style:font-size-complex="16pt" style:font-weight-complex="bold"/>
    </style:style>
    <style:style style:name="P8" style:family="paragraph" style:parent-style-name="First_20_line_20_indent">
      <style:text-properties fo:font-size="15pt" fo:font-weight="bold" officeooo:paragraph-rsid="0077fdf3" style:font-size-asian="15pt" style:font-weight-asian="bold" style:font-size-complex="15pt" style:font-weight-complex="bold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актическая работа: Работа с МФУ HP LaserJet M1005 MFP. Печать, сканирование, копирование.</text:p>
      <text:p text:style-name="P6"/>
      <text:p text:style-name="P8">Цель работы: Изучить устройство и освоить базовые операции многофункционального устройства HP LaserJet M1005 MFP: печать документа, сканирование в цифровой формат и копирование.</text:p>
      <text:p text:style-name="P6"/>
      <text:p text:style-name="P6">Оборудование и материалы:</text:p>
      <text:p text:style-name="P6"/>
      <text:p text:style-name="P6">· МФУ HP LaserJet M1005 MFP</text:p>
      <text:p text:style-name="P6">· ПК с установленным драйвером </text:p>
      <text:p text:style-name="P6">· Бумага формата А4</text:p>
      <text:p text:style-name="P6">· Тонер-картридж Q2612A</text:p>
      <text:p text:style-name="P6">· Документ-оригинал (текст/изображение)</text:p>
      <text:p text:style-name="P6"/>
      <text:p text:style-name="P6">Ход работы</text:p>
      <text:p text:style-name="P6"/>
      <text:p text:style-name="P6">Задание 1. Подготовка устройства и загрузка бумаги</text:p>
      <text:p text:style-name="P6"/>
      <text:p text:style-name="P6">1. Подключите МФУ к сети и ПК через USB-кабель .</text:p>
      <text:p text:style-name="P6">2. Убедитесь, что картридж с тонером установлен (ресурс ≈ 2000 страниц) .</text:p>
      <text:p text:style-name="P6">3. Загрузите бумагу в основной лоток (лоток 1): поместите до 150 листов коротким краем вперед, стороной для печати вниз. Отрегулируйте направляющие .</text:p>
      <text:p text:style-name="P6">4. Вопрос: Что будет, если загрузить бумагу стороной для печати вверх?</text:p>
      <text:p text:style-name="P6"><text:s text:c="3"/>· Ответ: В основном лотке M1005 печать производится на нижнюю сторону листа. Если загрузить бумагу неправильно, текст будет напечатан на обратной стороне, либо устройство не захватит лист.</text:p>
      <text:p text:style-name="P6"/>
      <text:p text:style-name="P6">Задание 2. Печать документа</text:p>
      <text:p text:style-name="P6"/>
      <text:p text:style-name="P6">1. Откройте на ПК любой текстовый документ.</text:p>
      <text:p text:style-name="P6">2. Выберите в меню "Печать" и в качестве принтера укажите HP LaserJet M1005.</text:p>
      <text:p text:style-name="P6">3. В настройках драйвера выберите вкладку "Бумага/Качество" и задайте формат А4 и тип бумаги .</text:p>
      <text:p text:style-name="P6">4. Для изменения качества печати используйте вкладку "Окончательная обработка", где можно выбрать количество страниц на листе или включить ручную двустороннюю печать .</text:p>
      <text:p text:style-name="P6">5. Отправьте документ на печать.</text:p>
      <text:p text:style-name="P6">6. Вопрос: На копиях появляются вертикальные белые полосы. В чем причина и как это исправить?</text:p>
      <text:p text:style-name="P6"><text:s text:c="3"/>· Ответ: Вероятная причина — низкий уровень тонера в картридже или его неравномерное распределение. Извлеките картридж и аккуратно встряхните его, чтобы распределить тонер. Если не помогает — требуется замена картриджа .</text:p>
      <text:p text:style-name="P6"><text:soft-page-break/></text:p>
      <text:p text:style-name="P6">Задание 3. Копирование документа</text:p>
      <text:p text:style-name="P6"/>
      <text:p text:style-name="P6">1. Поднимите крышку планшетного сканера.</text:p>
      <text:p text:style-name="P6">2. Поместите оригинал на стекло стороной для копирования вниз, совмещая левый верхний угол документа с правым нижним углом стекла .</text:p>
      <text:p text:style-name="P6">3. Закройте крышку.</text:p>
      <text:p text:style-name="P6">4. Для настройки качества копирования дважды нажмите клавишу "Дополнительные настройки копирования" и выберите режим:</text:p>
      <text:p text:style-name="P6"><text:s text:c="3"/>· Текст — для текстовых документов (по умолчанию)</text:p>
      <text:p text:style-name="P6"><text:s text:c="3"/>· Фотопленка — для фотографий .</text:p>
      <text:p text:style-name="P6">5. Чтобы настроить яркость, нажмите "Ярче/Темнее" и используйте стрелки для регулировки контрастности .</text:p>
      <text:p text:style-name="P6">6. Для изменения масштаба используйте "Дополнительные настройки" → "Уменьшить/Увеличить" (диапазон 25-400%) .</text:p>
      <text:p text:style-name="P6">7. Нажмите кнопку "Пуск копирования".</text:p>
      <text:p text:style-name="P6">8. Вопрос: Почему сканер M1005 требует класть оригинал текстом вниз, в отличие от МФУ с автоподатчиком (АПД)?</text:p>
      <text:p text:style-name="P6"><text:s text:c="3"/>· Ответ: M1005 оснащен только планшетным сканером. Сканирующий элемент (сенсор) находится под стеклом. Для корректного считывания информации оригинал должен лежать текстом непосредственно к стеклу .</text:p>
      <text:p text:style-name="P6"/>
      <text:p text:style-name="P6">Задание 4. Сканирование</text:p>
      <text:p text:style-name="P6"/>
      <text:p text:style-name="P6">1. Поместите оригинал на стекло сканера (как для копирования).</text:p>
      <text:p text:style-name="P6">2. На компьютере откройте программу HP LaserJet Scan (или любое TWAIN/WIA-приложение, например, Paint или Adobe Photoshop) .</text:p>
      <text:p text:style-name="P6">3. В программе выберите источник сканирования HP LaserJet M1005.</text:p>
      <text:p text:style-name="P6">4. Настройте разрешение сканирования:</text:p>
      <text:p text:style-name="P6"><text:s text:c="3"/>· 150–200 dpi — для текстовых документов</text:p>
      <text:p text:style-name="P6"><text:s text:c="3"/>· 300 dpi — для качественных изображений .</text:p>
      <text:p text:style-name="P6">5. Запустите сканирование и сохраните полученный файл.</text:p>
      <text:p text:style-name="P6">6. Вопрос: На отсканированном изображении появился "мусор" в виде темных точек или линий. Что делать?</text:p>
      <text:p text:style-name="P6"><text:s text:c="3"/>· Ответ: Вероятно, загрязнено стекло сканера. Необходимо выключить устройство и аккуратно протереть стекло мягкой безворсовой тканью со специальным чистящим средством или изопропиловым спирто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09:01:36.898050573</meta:creation-date>
    <dc:title>Default</dc:title>
    <meta:editing-cycles>2</meta:editing-cycles>
    <meta:editing-duration>PT2M48S</meta:editing-duration>
    <meta:generator>LibreOffice/7.5.6.2$Linux_X86_64 LibreOffice_project/50$Build-2</meta:generator>
    <dc:date>2026-06-18T09:04:25.363937390</dc:date>
    <meta:document-statistic meta:table-count="1" meta:image-count="0" meta:object-count="0" meta:page-count="2" meta:paragraph-count="55" meta:word-count="513" meta:character-count="3597" meta:non-whitespace-character-count="3109"/>
  </office:meta>
</office:document-meta>
</file>