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8" style:family="paragraph" style:parent-style-name="First_20_line_20_indent">
      <style:text-properties fo:font-size="15pt" fo:font-weight="bold" officeooo:paragraph-rsid="0077fdf3" style:font-size-asian="15pt" style:font-weight-asian="bold" style:font-size-complex="15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еская работа: Программирование периферийного робота. Цикл «Поднятие и опускание кубика».</text:p>
      <text:p text:style-name="P6"/>
      <text:p text:style-name="P8">Цель работы: Научиться управлять концевым эффектором (захватом) и сервоприводами звеньев для выполнения точной операции взятия/установки объекта с привязкой к координатам рабочей зоны.</text:p>
      <text:p text:style-name="P6"/>
      <text:p text:style-name="P6">Оборудование и материалы:</text:p>
      <text:p text:style-name="P6"/>
      <text:p text:style-name="P6">· Учебный робот-манипулятор (с как минимум 4 степенями свободы).</text:p>
      <text:p text:style-name="P6">· Контроллер/ПК с установленной средой разработки.</text:p>
      <text:p text:style-name="P6">· Набор кубиков (или маркеров) заданного размера, размещенных в определенных ячейках поля.</text:p>
      <text:p text:style-name="P6"/>
      <text:p text:style-name="P6">Ход работы (Инструкционная карта)</text:p>
      <text:p text:style-name="P6"/>
      <text:p text:style-name="P6">Этап 1. Калибровка «Нулевой точки» (Home Position)</text:p>
      <text:p text:style-name="P6"/>
      <text:p text:style-name="P6">1. Включите робота. Запустите программу управления.</text:p>
      <text:p text:style-name="P6">2. Отправьте робота в «Домой» (нулевое положение всех осей).</text:p>
      <text:p text:style-name="P6">3. Вопрос: Почему перед каждым запуском программы нужно выполнять команду go_home() или reset()?</text:p>
      <text:p text:style-name="P6"><text:s text:c="3"/>· Ответ: Энкодеры двигателей считают шаги от последней известной точки. Если не обнулить координаты, робот «забудет» свое физическое положение в пространстве, и все последующие расчеты (X, Y, Z) будут выполняться с накопленной ошибкой, что приведет к промаху мимо кубика.</text:p>
      <text:p text:style-name="P6"/>
      <text:p text:style-name="P6">Этап 2. Снятие «Контрольных точек» (Запись координат)</text:p>
      <text:p text:style-name="P6"/>
      <text:p text:style-name="P6">1. В ручном режиме (Jog Mode) подведите захват робота строго над центром первого кубика на высоте 1–2 см.</text:p>
      <text:p text:style-name="P6">2. Запишите в переменные координаты: X1, Y1, Z_high_1 (высота облета).</text:p>
      <text:p text:style-name="P6">3. Опустите захват строго до касания с верхней гранью кубика. Запишите координату: Z_low_1.</text:p>
      <text:p text:style-name="P6">4. Повторите это для точки складирования (куда будем класть кубик) — точки X2, Y2, Z_high_2 и Z_low_2.</text:p>
      <text:p text:style-name="P6">5. Вопрос: Зачем нам записывать две разные координаты Z (высокую и низкую) для одной и той же точки по X и Y?</text:p>
      <text:p text:style-name="P6"><text:s text:c="3"/>· Ответ: Это разделение на транспортную высоту (Z_high) — для быстрого горизонтального перемещения без риска задеть стол, и рабочую высоту (Z_low) — для точного захвата/отпускания. Это безопаснее, чем двигаться по диагонали.</text:p>
      <text:p text:style-name="P6"/>
      <text:p text:style-name="P6">Этап 3. Программирование захвата (Эффектор)</text:p>
      <text:p text:style-name="P6"/>
      <text:p text:style-name="P6"><text:soft-page-break/>1. Изучите, какие команды отвечают за сервопривод «кисти» (открыть/закрыть).</text:p>
      <text:p text:style-name="P6">2. Вопрос: В чем разница между командами grip_open() и grip_close() с точки зрения усилия (крутящего момента)?</text:p>
      <text:p text:style-name="P6"><text:s text:c="3"/>· Ответ: grip_open() обычно работает на ограничение хода (разжал до упора и отключился), а grip_close() требует задания усилия (или времени удержания), чтобы не раздавить хрупкий кубик, но и не уронить его при перемещении. Программист должен задать допуск по току мотора захвата.</text:p>
      <text:p text:style-name="P6"/>
      <text:p text:style-name="P6">Этап 4. Написание основного цикла (Алгоритм «Схвати-Перенеси-Отпусти»)</text:p>
      <text:p text:style-name="P6"/>
      <text:p text:style-name="P6">Напишите код, который выполняет следующие действия (логика робота-манипулятора):</text:p>
      <text:p text:style-name="P6"/>
      <text:p text:style-name="P6">1. Перейти в точку Home.</text:p>
      <text:p text:style-name="P6">2. Перейти в X1, Y1, Z_high_1 (над кубиком).</text:p>
      <text:p text:style-name="P6">3. Опуститься в X1, Y1, Z_low_1 (на кубик).</text:p>
      <text:p text:style-name="P6">4. Закрыть захват (с усилием 30%).</text:p>
      <text:p text:style-name="P6">5. Подняться обратно в X1, Y1, Z_high_1 (подняли кубик).</text:p>
      <text:p text:style-name="P6">6. Переместиться в X2, Y2, Z_high_2 (над местом склада).</text:p>
      <text:p text:style-name="P6">7. Опуститься в X2, Y2, Z_low_2.</text:p>
      <text:p text:style-name="P6">8. Открыть захват (положить кубик).</text:p>
      <text:p text:style-name="P6">9. Подняться в X2, Y2, Z_high_2.</text:p>
      <text:p text:style-name="P6">10. Вернуться в Home.</text:p>
      <text:p text:style-name="P6"/>
      <text:p text:style-name="P6">Этап 5. Отладка (Траектория движения)</text:p>
      <text:p text:style-name="P6"/>
      <text:p text:style-name="P6">1. Запустите программу в замедленном режиме (или пошагово).</text:p>
      <text:p text:style-name="P6">2. Вопрос: Почему программисты всегда сначала тестируют движение без кубика (вхолостую) или на пониженной скорости?</text:p>
      <text:p text:style-name="P6"><text:s text:c="3"/>· Ответ: Чтобы убедиться, что траектория не выходит за рабочий объем (не ударит в стойку) и не происходит коллизия (столкновение звеньев). Вдруг мы перепутали координаты Z_low и Z_high, и робот врежется в стол? Это правило безопасности №1.</text:p>
      <text:p text:style-name="P6"/>
      <text:p text:style-name="P6">Этап 6. Добавление интерактива (Усложнение)</text:p>
      <text:p text:style-name="P6"/>
      <text:p text:style-name="P6">Измените программу так, чтобы робот брал кубик, поднимал его на максимальную высоту, делал паузу 2 секунды (имитация сканирования) и только потом опускал.</text:p>
      <text:p text:style-name="P6"/>
      <text:p text:style-name="P6">· Вопрос: Зачем в промышленных роботах программируют паузы между движением осей?</text:p>
      <text:p text:style-name="P6"><text:s text:c="2"/>· Ответ: Чтобы дать время инерции (вибрации) затухнуть. Если сервопривод резко остановился, а мы сразу даем команду на закрытие захвата — он может <text:soft-page-break/>промахнуться на доли миллиметра. Пауза нужна для стабилизации системы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8:46:57.773635723</meta:creation-date>
    <dc:title>Default</dc:title>
    <meta:editing-cycles>2</meta:editing-cycles>
    <meta:editing-duration>PT4M4S</meta:editing-duration>
    <meta:generator>LibreOffice/7.5.6.2$Linux_X86_64 LibreOffice_project/50$Build-2</meta:generator>
    <dc:date>2026-06-18T08:51:01.840714419</dc:date>
    <meta:document-statistic meta:table-count="1" meta:image-count="0" meta:object-count="0" meta:page-count="3" meta:paragraph-count="53" meta:word-count="565" meta:character-count="3902" meta:non-whitespace-character-count="3373"/>
  </office:meta>
</office:document-meta>
</file>