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 style:master-page-name="First_20_Page">
      <style:paragraph-properties style:page-number="auto"/>
      <style:text-properties fo:font-size="16pt" fo:font-weight="bold" officeooo:paragraph-rsid="0077fdf3" style:font-size-asian="16pt" style:font-weight-asian="bold" style:font-size-complex="16pt" style:font-weight-complex="bold"/>
    </style:style>
    <style:style style:name="P8" style:family="paragraph" style:parent-style-name="First_20_line_20_indent">
      <style:text-properties fo:font-size="15pt" fo:font-weight="bold" officeooo:paragraph-rsid="0077fdf3" style:font-size-asian="15pt" style:font-weight-asian="bold" style:font-size-complex="15pt" style:font-weight-complex="bold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рактическая работа: Управление Arduino-машинкой. Движение, управление и датчики.</text:p>
      <text:p text:style-name="P6"/>
      <text:p text:style-name="P8">Цель работы: Получить практические навыки сборки, программирования и управления колесным роботом на базе Arduino. Вы научитесь управлять моторами, подключать датчики и реализовывать базовые алгоритмы движения.</text:p>
      <text:p text:style-name="P6"/>
      <text:p text:style-name="P6">Оборудование и материалы:</text:p>
      <text:p text:style-name="P6"/>
      <text:p text:style-name="P6">· Arduino UNO (или совместимая плата)</text:p>
      <text:p text:style-name="P6">· Motor Shield (L298N или L293D)</text:p>
      <text:p text:style-name="P6">· 2-4 DC мотора с колесами</text:p>
      <text:p text:style-name="P6">· Шасси (платформа)</text:p>
      <text:p text:style-name="P6">· Источник питания (аккумулятор 7.4В или батарейный отсек)</text:p>
      <text:p text:style-name="P6">· Датчики (по выбору): HC-SR04 (ультразвуковой), IR-датчики линии, Bluetooth HC-05/HC-06</text:p>
      <text:p text:style-name="P6">· USB-кабель, перемычки</text:p>
      <text:p text:style-name="P6">· Arduino IDE</text:p>
      <text:p text:style-name="P6"/>
      <text:p text:style-name="P6">Ход работы</text:p>
      <text:p text:style-name="P6"/>
      <text:p text:style-name="P6">Этап 1. Сборка и подключение</text:p>
      <text:p text:style-name="P6"/>
      <text:p text:style-name="P6">1. Закрепите моторы на шасси, установите колеса.</text:p>
      <text:p text:style-name="P6">2. Установите Arduino UNO и Motor Shield . Подключите провода моторов к выходам драйвера (M1, M2, M3, M4).</text:p>
      <text:p text:style-name="P6">3. Вопрос: Почему для питания моторов НЕЛЬЗЯ использовать USB-порт компьютера?</text:p>
      <text:p text:style-name="P6"><text:s text:c="3"/>· Ответ: USB-порт дает максимум 500 мА, а моторы при старте потребляют гораздо больше (до 1–2 А). Это может вызвать сброс Arduino или повреждение USB-порта. Для питания используйте отдельный аккумулятор .</text:p>
      <text:p text:style-name="P6"/>
      <text:p text:style-name="P6">Этап 2. Базовое управление моторами (Прямо, назад, повороты)</text:p>
      <text:p text:style-name="P6"/>
      <text:p text:style-name="P6">1. Подключите плату к ПК и откройте Arduino IDE.</text:p>
      <text:p text:style-name="P6">2. Для работы с L298N драйвером обычно используются функции analogWrite() для скорости и digitalWrite() для направления .</text:p>
      <text:p text:style-name="P6">3. Загрузите код для движения вперед/назад и поворотов:</text:p>
      <text:p text:style-name="P6"/>
      <text:p text:style-name="P6">```cpp</text:p>
      <text:p text:style-name="P6">int speedPin_M1 = 5; <text:s text:c="4"/>// Скорость M1</text:p>
      <text:p text:style-name="P6">int speedPin_M2 = 6; <text:s text:c="4"/>// Скорость M2</text:p>
      <text:p text:style-name="P6">int dirPin_M1 = 4; <text:s text:c="6"/>// Направление M1</text:p>
      <text:p text:style-name="P6"><text:soft-page-break/>int dirPin_M2 = 7; <text:s text:c="6"/>// Направление M2</text:p>
      <text:p text:style-name="P6"/>
      <text:p text:style-name="P6">void setup() {</text:p>
      <text:p text:style-name="P6"><text:s text:c="2"/>pinMode(speedPin_M1, OUTPUT);</text:p>
      <text:p text:style-name="P6"><text:s text:c="2"/>pinMode(speedPin_M2, OUTPUT);</text:p>
      <text:p text:style-name="P6"><text:s text:c="2"/>pinMode(dirPin_M1, OUTPUT);</text:p>
      <text:p text:style-name="P6"><text:s text:c="2"/>pinMode(dirPin_M2, OUTPUT);</text:p>
      <text:p text:style-name="P6">}</text:p>
      <text:p text:style-name="P6"/>
      <text:p text:style-name="P6">void loop() {</text:p>
      <text:p text:style-name="P6"><text:s text:c="2"/>carAdvance(150, 150); <text:s/>// Вперед со скоростью 150</text:p>
      <text:p text:style-name="P6"><text:s text:c="2"/>delay(2000);</text:p>
      <text:p text:style-name="P6"><text:s text:c="2"/>carTurnLeft(200, 200); // Поворот налево</text:p>
      <text:p text:style-name="P6"><text:s text:c="2"/>delay(1000);</text:p>
      <text:p text:style-name="P6"><text:s text:c="2"/>carStop();</text:p>
      <text:p text:style-name="P6"><text:s text:c="2"/>delay(1000);</text:p>
      <text:p text:style-name="P6">}</text:p>
      <text:p text:style-name="P6"/>
      <text:p text:style-name="P6">void carAdvance(int leftSpeed, int rightSpeed) {</text:p>
      <text:p text:style-name="P6"><text:s text:c="2"/>analogWrite(speedPin_M1, leftSpeed);</text:p>
      <text:p text:style-name="P6"><text:s text:c="2"/>digitalWrite(dirPin_M1, HIGH);</text:p>
      <text:p text:style-name="P6"><text:s text:c="2"/>analogWrite(speedPin_M2, rightSpeed);</text:p>
      <text:p text:style-name="P6"><text:s text:c="2"/>digitalWrite(dirPin_M2, HIGH);</text:p>
      <text:p text:style-name="P6">}</text:p>
      <text:p text:style-name="P6"/>
      <text:p text:style-name="P6">void carTurnLeft(int leftSpeed, int rightSpeed) {</text:p>
      <text:p text:style-name="P6"><text:s text:c="2"/>analogWrite(speedPin_M1, leftSpeed);</text:p>
      <text:p text:style-name="P6"><text:s text:c="2"/>digitalWrite(dirPin_M1, LOW); <text:s text:c="3"/>// Левое колесо назад</text:p>
      <text:p text:style-name="P6"><text:s text:c="2"/>analogWrite(speedPin_M2, rightSpeed);</text:p>
      <text:p text:style-name="P6"><text:s text:c="2"/>digitalWrite(dirPin_M2, HIGH); <text:s text:c="2"/>// Правое колесо вперед</text:p>
      <text:p text:style-name="P6">}</text:p>
      <text:p text:style-name="P6"/>
      <text:p text:style-name="P6">void carStop() {</text:p>
      <text:p text:style-name="P6"><text:s text:c="2"/>analogWrite(speedPin_M1, 0);</text:p>
      <text:p text:style-name="P6"><text:s text:c="2"/>analogWrite(speedPin_M2, 0);</text:p>
      <text:p text:style-name="P6">}</text:p>
      <text:p text:style-name="P6">```</text:p>
      <text:p text:style-name="P6"/>
      <text:p text:style-name="P6">4. Вопрос: Как сделать поворот на месте (танковый разворот), а не дугой?</text:p>
      <text:p text:style-name="P6"><text:s text:c="3"/>· Ответ: Нужно подать на левые моторы команду "вперед", а на правые — "назад" (или наоборот), с одинаковой скоростью. В примере выше carTurnLeft как раз так и работает: левое колесо крутится назад, правое — вперед .</text:p>
      <text:p text:style-name="P6"/>
      <text:p text:style-name="P6">Этап 3. Управление по Bluetooth</text:p>
      <text:p text:style-name="P6"/>
      <text:p text:style-name="P6"><text:soft-page-break/>1. Подключите Bluetooth-модуль HC-05/HC-06: VCC → 5V, GND → GND, TX → RX (пин 0), RX → TX (пин 1) .</text:p>
      <text:p text:style-name="P6">2. Вопрос: Почему при загрузке скетча нужно отключать пины TX/RX от Bluetooth?</text:p>
      <text:p text:style-name="P6"><text:s text:c="3"/>· Ответ: Bluetooth-модуль использует те же аппаратные пины (0 и 1), что и загрузчик Arduino. Подключенный модуль может помешать процессу загрузки. Отключайте его на время прошивки .</text:p>
      <text:p text:style-name="P6">3. Загрузите скетч, который считывает команды (например, 'F' — вперед, 'B' — назад, 'L' — влево, 'R' — вправо, 'S' — стоп) с Bluetooth и управляет моторами :</text:p>
      <text:p text:style-name="P6"/>
      <text:p text:style-name="P6">```cpp</text:p>
      <text:p text:style-name="P6">char command;</text:p>
      <text:p text:style-name="P6"/>
      <text:p text:style-name="P6">void setup() {</text:p>
      <text:p text:style-name="P6"><text:s text:c="2"/>Serial.begin(9600);</text:p>
      <text:p text:style-name="P6"><text:s text:c="2"/>// ... настройка пинов моторов ...</text:p>
      <text:p text:style-name="P6">}</text:p>
      <text:p text:style-name="P6"/>
      <text:p text:style-name="P6">void loop() {</text:p>
      <text:p text:style-name="P6"><text:s text:c="2"/>if (Serial.available() &gt; 0) {</text:p>
      <text:p text:style-name="P6"><text:s text:c="4"/>command = Serial.read();</text:p>
      <text:p text:style-name="P6"><text:s text:c="4"/>switch(command) {</text:p>
      <text:p text:style-name="P6"><text:s text:c="6"/>case 'F': carAdvance(150, 150); break;</text:p>
      <text:p text:style-name="P6"><text:s text:c="6"/>case 'B': carBack(150, 150); break;</text:p>
      <text:p text:style-name="P6"><text:s text:c="6"/>case 'L': carTurnLeft(200, 200); break;</text:p>
      <text:p text:style-name="P6"><text:s text:c="6"/>case 'R': carTurnRight(200, 200); break;</text:p>
      <text:p text:style-name="P6"><text:s text:c="6"/>case 'S': carStop(); break;</text:p>
      <text:p text:style-name="P6"><text:s text:c="4"/>}</text:p>
      <text:p text:style-name="P6"><text:s text:c="2"/>}</text:p>
      <text:p text:style-name="P6">}</text:p>
      <text:p text:style-name="P6">```</text:p>
      <text:p text:style-name="P6"/>
      <text:p text:style-name="P6">4. Скачайте на телефон любое приложение "Arduino Bluetooth Controller" и отправляйте команды.</text:p>
      <text:p text:style-name="P6"/>
      <text:p text:style-name="P6">Этап 4. Объезд препятствий (ультразвуковой датчик)</text:p>
      <text:p text:style-name="P6"/>
      <text:p text:style-name="P6">1. Установите датчик HC-SR04 на переднюю часть шасси .</text:p>
      <text:p text:style-name="P6">2. Подключите: VCC → 5V, GND → GND, TRIG → пин 7, ECHO → пин 4.</text:p>
      <text:p text:style-name="P6">3. Используйте библиотеку NewPingили код для чтения расстояния в сантиметрах:</text:p>
      <text:p text:style-name="P6"/>
      <text:p text:style-name="P6">```cpp</text:p>
      <text:p text:style-name="P6">const int trigPin = 7;</text:p>
      <text:p text:style-name="P6">const int echoPin = 4;</text:p>
      <text:p text:style-name="P6"><text:soft-page-break/></text:p>
      <text:p text:style-name="P6">long readDistance() {</text:p>
      <text:p text:style-name="P6"><text:s text:c="2"/>digitalWrite(trigPin, LOW);</text:p>
      <text:p text:style-name="P6"><text:s text:c="2"/>delayMicroseconds(2);</text:p>
      <text:p text:style-name="P6"><text:s text:c="2"/>digitalWrite(trigPin, HIGH);</text:p>
      <text:p text:style-name="P6"><text:s text:c="2"/>delayMicroseconds(10);</text:p>
      <text:p text:style-name="P6"><text:s text:c="2"/>digitalWrite(trigPin, LOW);</text:p>
      <text:p text:style-name="P6"><text:s text:c="2"/>long duration = pulseIn(echoPin, HIGH);</text:p>
      <text:p text:style-name="P6"><text:s text:c="2"/>return duration * 0.034 / 2; // расстояние в см</text:p>
      <text:p text:style-name="P6">}</text:p>
      <text:p text:style-name="P6">```</text:p>
      <text:p text:style-name="P6"/>
      <text:p text:style-name="P6">4. Реализуйте логику: если расстояние меньше 20 см — остановиться, сдать назад, повернуть и поехать дальше .</text:p>
      <text:p text:style-name="P6">5. Вопрос: Почему ультразвуковой датчик может давать сбой на ковре или в углу комнаты?</text:p>
      <text:p text:style-name="P6"><text:s text:c="3"/>· Ответ: Мягкие поверхности (ковер, ткань) плохо отражают ультразвук. В углах возникают переотражения, из-за которых датчик показывает неверное расстояние (иногда даже меньше реального). Для точности нужна ровная поверхность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08:39:21.867342514</meta:creation-date>
    <dc:title>Default</dc:title>
    <meta:editing-cycles>2</meta:editing-cycles>
    <meta:editing-duration>PT2M35S</meta:editing-duration>
    <meta:generator>LibreOffice/7.5.6.2$Linux_X86_64 LibreOffice_project/50$Build-2</meta:generator>
    <dc:date>2026-06-19T08:41:56.863622210</dc:date>
    <meta:document-statistic meta:table-count="1" meta:image-count="0" meta:object-count="0" meta:page-count="4" meta:paragraph-count="114" meta:word-count="667" meta:character-count="4736" meta:non-whitespace-character-count="4034"/>
  </office:meta>
</office:document-meta>
</file>