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>
      <style:text-properties officeooo:paragraph-rsid="0077fdf3"/>
    </style:style>
    <style:style style:name="P7" style:family="paragraph" style:parent-style-name="First_20_line_20_indent">
      <style:text-properties fo:font-size="15pt" fo:font-weight="bold" officeooo:paragraph-rsid="0077fdf3" style:font-size-asian="15pt" style:font-weight-asian="bold" style:font-size-complex="15pt" style:font-weight-complex="bold"/>
    </style:style>
    <style:style style:name="P8" style:family="paragraph" style:parent-style-name="First_20_line_20_indent" style:master-page-name="First_20_Page">
      <style:paragraph-properties style:page-number="auto"/>
      <style:text-properties fo:font-size="16pt" fo:font-weight="bold" officeooo:paragraph-rsid="0077fdf3" style:font-size-asian="16pt" style:font-weight-asian="bold" style:font-size-complex="16pt" style:font-weight-complex="bold"/>
    </style:style>
    <style:style style:name="P9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Практическая работа: Техническое обслуживание системного блока. Замена термопасты.</text:p>
      <text:p text:style-name="P6"/>
      <text:p text:style-name="P7">Цель работы: Получить практические навыки разборки/сборки системного блока, изучить устройство систем охлаждения, освоить технологию правильного нанесения термопасты для снижения температуры процессора.</text:p>
      <text:p text:style-name="P6"/>
      <text:p text:style-name="P6">Оборудование и материалы:</text:p>
      <text:p text:style-name="P6"/>
      <text:p text:style-name="P6">· Системный блок (настольный ПК).</text:p>
      <text:p text:style-name="P6">· Крестовая отвертка (средняя).</text:p>
      <text:p text:style-name="P6">· Термопаста (туба или шприц).</text:p>
      <text:p text:style-name="P6">· Безворсовая ткань (или кофейные фильтры) и спирт (изопропиловый) для очистки.</text:p>
      <text:p text:style-name="P6">· Пластиковая лопатка/карта (для разравнивания) или антистатический браслет (опционально).</text:p>
      <text:p text:style-name="P6"/>
      <text:p text:style-name="P6">Ход работы (Инструкционная карта)</text:p>
      <text:p text:style-name="P6"/>
      <text:p text:style-name="P6">Этап 1. Подготовка и техника безопасности</text:p>
      <text:p text:style-name="P6"/>
      <text:p text:style-name="P6">1. Полностью обесточьте ПК (выдерните шнур питания из розетки).</text:p>
      <text:p text:style-name="P6">2. Нажмите на кнопку включения ПК (чтобы снять остаточное напряжение с конденсаторов).</text:p>
      <text:p text:style-name="P6">3. Переместите системный блок на хорошо освещенный стол.</text:p>
      <text:p text:style-name="P6">4. Вопрос: Почему перед работой нужно обязательно коснуться заземленного предмета (батареи) или использовать антистатический браслет?</text:p>
      <text:p text:style-name="P6"><text:s text:c="3"/>· Ответ: Чтобы снять статическое электричество с тела. Даже незаметный для человека разряд может пробить полупроводниковые элементы (чипы) на материнской плате или видеокарте.</text:p>
      <text:p text:style-name="P6"/>
      <text:p text:style-name="P6">Этап 2. Демонтаж боковой крышки</text:p>
      <text:p text:style-name="P6"/>
      <text:p text:style-name="P6">1. Открутите два винта на задней панели (которые держат левую крышку, если смотреть спереди).</text:p>
      <text:p text:style-name="P6">2. Сдвиньте крышку назад и снимите ее.</text:p>
      <text:p text:style-name="P6">3. Вопрос: Почему не рекомендуется снимать обе крышки системного блока, если мы просто чистим процессор?</text:p>
      <text:p text:style-name="P6"><text:s text:c="3"/>· Ответ: Снятие только левой крышки обеспечивает доступ к комплектующим, при этом правая крышка сохраняет жесткость конструкции корпуса и предотвращает его перекашивание, а также защищает внутренности от случайных падений инструмента.</text:p>
      <text:p text:style-name="P6"/>
      <text:p text:style-name="P6"><text:soft-page-break/>Этап 3. Отключение кулера (системы охлаждения)</text:p>
      <text:p text:style-name="P6"/>
      <text:p text:style-name="P6">1. Найдите радиатор (башню или «бокс») над процессором (обычно в центре материнской платы).</text:p>
      <text:p text:style-name="P6">2. Аккуратно отсоедините провод вентилятора (разъем CPU_FAN) от материнской платы.</text:p>
      <text:p text:style-name="P6">3. Открутите винты или расстегните защелки крепления радиатора.</text:p>
      <text:p text:style-name="P6">4. Вопрос: Зачем нужно прокручивать радиатор из стороны в сторону перед тем, как тянуть его вверх?</text:p>
      <text:p text:style-name="P6"><text:s text:c="3"/>· Ответ: Старая термопаста со временем затвердевает и может «приклеить» радиатор к процессору. Если дернуть резко, можно вырвать процессор из сокета (гнезда) и погнуть ножки. Поворотом мы разрушаем сцепление пасты.</text:p>
      <text:p text:style-name="P6"/>
      <text:p text:style-name="P6">Этап 4. Очистка поверхностей</text:p>
      <text:p text:style-name="P6"/>
      <text:p text:style-name="P6">1. Отделите вентилятор от радиатора (если это возможно) и сдуйте пыль/продуйте сжатым воздухом.</text:p>
      <text:p text:style-name="P6">2. Возьмите безворсовую ткань, смочите ее спиртом.</text:p>
      <text:p text:style-name="P6">3. Удалите старую термопасту с нижней части радиатора (подошвы).</text:p>
      <text:p text:style-name="P6">4. Удалите старую термопасту с крышки самого процессора.</text:p>
      <text:p text:style-name="P6">5. Вопрос: Почему важно, чтобы салфетка была безворсовой, и почему нельзя использовать вату?</text:p>
      <text:p text:style-name="P6"><text:s text:c="3"/>· Ответ: Ворсинки ваты или бумажные волокна могут остаться на поверхностях. Если микроволокно попадет между процессором и радиатором, оно создаст воздушный зазор. Воздух плохо проводит тепло, что приведет к перегреву.</text:p>
      <text:p text:style-name="P6"/>
      <text:p text:style-name="P6">Этап 5. Нанесение новой термопасты (Ключевой момент)</text:p>
      <text:p text:style-name="P6"/>
      <text:p text:style-name="P6">1. Убедитесь, что поверхности сухие и чистые (блестят).</text:p>
      <text:p text:style-name="P6">2. Выдавите небольшое количество пасты (размером с горошину или рисовое зерно) в центр крышки процессора.</text:p>
      <text:p text:style-name="P6">3. Вопрос: Почему пасту нужно наносить именно в центр, а не размазывать по всей площади заранее?</text:p>
      <text:p text:style-name="P6"><text:s text:c="3"/>· Ответ: При прижиме радиатором паста под давлением сама равномерно расползется по всей площади (закон сообщающихся сосудов/давления). Если размазать вручную, можно получить неравномерный слой или пузырьки воздуха. Исключение — очень вязкие пасты, которые разрешается размазывать лопаткой.</text:p>
      <text:p text:style-name="P6">4. Вопрос: Что будет, если нанести слишком много термопасты?</text:p>
      <text:p text:style-name="P6"><text:s text:c="3"/>· Ответ: Излишки выдавятся за края процессора. Если паста содержит металлические частицы (например, Conductonaut), она может замкнуть контакты на материнской плате. Даже обычная паста в большом количестве ухудшает теплоотвод (слой становится толстым, медь радиатора не касается крышки плотно).</text:p>
      <text:p text:style-name="P6"/>
      <text:p text:style-name="P6">Этап 6. Установка радиатора и сборка</text:p>
      <text:p text:style-name="P6"/>
      <text:p text:style-name="P6"><text:soft-page-break/>1. Установите радиатор на процессор строго горизонтально (без перекосов) и зафиксируйте его штатным креплением.</text:p>
      <text:p text:style-name="P6">2. Подключите вентилятор обратно в разъем CPU_FAN.</text:p>
      <text:p text:style-name="P6">3. Проверьте, чтобы провода не попадали в лопасти вентилятора.</text:p>
      <text:p text:style-name="P6">4. Закройте крышку корпуса.</text:p>
      <text:p text:style-name="P6"/>
      <text:p text:style-name="P6">Этап 7. Тестирование (Проверка результата)</text:p>
      <text:p text:style-name="P6"/>
      <text:p text:style-name="P6">1. Подключите питание, включите ПК.</text:p>
      <text:p text:style-name="P6">2. Скачайте программу мониторинга (например, HWMonitor или AIDA64).</text:p>
      <text:p text:style-name="P6">3. Запустите тест стабильности (Stress Test) на 5 минут и посмотрите на температуру процессора.</text:p>
      <text:p text:style-name="P6">4. Вопрос: Как понять, что работа выполнена успешно?</text:p>
      <text:p text:style-name="P6"><text:s text:c="3"/>· Ответ: Температура в простое должна быть на 5–10°C ниже, чем до замены. В нагрузке (при 100% использовании) процессор не должен достигать порога троттлинга (обычно 90–100°C). Если температуры снизились — цель достигнута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3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8T08:37:36.818653612</meta:creation-date>
    <dc:title>Default</dc:title>
    <meta:editing-cycles>3</meta:editing-cycles>
    <meta:editing-duration>PT4M55S</meta:editing-duration>
    <meta:generator>LibreOffice/7.5.6.2$Linux_X86_64 LibreOffice_project/50$Build-2</meta:generator>
    <dc:date>2026-06-18T08:45:48.257145846</dc:date>
    <meta:document-statistic meta:table-count="1" meta:image-count="0" meta:object-count="0" meta:page-count="3" meta:paragraph-count="61" meta:word-count="645" meta:character-count="4711" meta:non-whitespace-character-count="4106"/>
  </office:meta>
</office:document-meta>
</file>