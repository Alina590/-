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 style:master-page-name="First_20_Page">
      <style:paragraph-properties style:page-number="auto"/>
      <style:text-properties fo:font-size="16pt" fo:font-weight="bold" officeooo:paragraph-rsid="0077fdf3" style:font-size-asian="16pt" style:font-weight-asian="bold" style:font-size-complex="16pt" style:font-weight-complex="bold"/>
    </style:style>
    <style:style style:name="P8" style:family="paragraph" style:parent-style-name="First_20_line_20_indent">
      <style:text-properties fo:font-size="15pt" fo:font-weight="bold" officeooo:paragraph-rsid="0077fdf3" style:font-size-asian="15pt" style:font-weight-asian="bold" style:font-size-complex="15pt" style:font-weight-complex="bold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актическая работа: Работа с BIOS/UEFI. Настройка параметров и диагностика.</text:p>
      <text:p text:style-name="P8"/>
      <text:p text:style-name="P8">Цель работы: Изучить структуру и базовые функции BIOS/UEFI, освоить настройку приоритета загрузки, управление аппаратными компонентами и диагностику неисправностей.</text:p>
      <text:p text:style-name="P6"/>
      <text:p text:style-name="P6">Оборудование и материалы:</text:p>
      <text:p text:style-name="P6"/>
      <text:p text:style-name="P6">· Персональный компьютер</text:p>
      <text:p text:style-name="P6">· Клавиатура (желательно PS/2, т.к. USB может не работать в старых BIOS)</text:p>
      <text:p text:style-name="P6">· Загрузочная флешка с ОС (Windows/Linux)</text:p>
      <text:p text:style-name="P6"/>
      <text:p text:style-name="P6">Ход работы</text:p>
      <text:p text:style-name="P6"/>
      <text:p text:style-name="P6">Этап 1. Вход в BIOS/UEFI</text:p>
      <text:p text:style-name="P6"/>
      <text:p text:style-name="P6">1. Включите компьютер.</text:p>
      <text:p text:style-name="P6">2. В первые секунды загрузки нажимайте клавишу входа (обычно Del, F2, F10 или Esc). Производители: Gigabyte — Del, ASUS — F2/Del, HP — F10, Lenovo — F1/F2.</text:p>
      <text:p text:style-name="P6">3. Вопрос: Почему для входа в BIOS нужно нажимать клавишу многократно, а не удерживать?</text:p>
      <text:p text:style-name="P6"><text:s text:c="3"/>· Ответ: Удержание может быть воспринято как "залипание" клавиши, и BIOS проигнорирует её. Быстрое многократное нажатие гарантирует, что система перехватит сигнал в момент опроса клавиатуры.</text:p>
      <text:p text:style-name="P6"/>
      <text:p text:style-name="P6">Этап 2. Навигация по интерфейсу</text:p>
      <text:p text:style-name="P6"/>
      <text:p text:style-name="P6">1. Изучите главное меню. Для старых BIOS (текстовый синий фон) используйте стрелки, Enter и Esc. Для современных UEFI (графический, с поддержкой мыши) — используйте мышь.</text:p>
      <text:p text:style-name="P6">2. Обратите внимание на подсказки внизу экрана (F1 — Help, F10 — Save &amp; Exit и т.д.).</text:p>
      <text:p text:style-name="P6">3. Вопрос: Чем UEFI принципиально отличается от классического BIOS?</text:p>
      <text:p text:style-name="P6"><text:s text:c="3"/>· Ответ: UEFI имеет графический интерфейс, поддерживает мышь, загружается с GPT-дисков, имеет защиту Secure Boot и работает быстрее. BIOS работает только с MBR-дисками и не поддерживает диски объёмом более 2 ТБ.</text:p>
      <text:p text:style-name="P6"/>
      <text:p text:style-name="P6">Этап 3. Управление загрузкой (Boot Order)</text:p>
      <text:p text:style-name="P6"/>
      <text:p text:style-name="P6">1. Перейдите в раздел Boot (Загрузка).</text:p>
      <text:p text:style-name="P6">2. Измените приоритет загрузки: поставьте USB-HDD (или флешку) на первое место, а Hard Disk (жесткий диск) — на второе.</text:p>
      <text:p text:style-name="P6"><text:soft-page-break/>3. Сохраните изменения (F10 → Yes).</text:p>
      <text:p text:style-name="P6">4. Вопрос: Что такое "Boot Menu" и зачем он нужен, если есть настройка приоритета в BIOS?</text:p>
      <text:p text:style-name="P6"><text:s text:c="3"/>· Ответ: Boot Menu (обычно вызывается клавишей F8/F12) — это одноразовый выбор устройства загрузки без изменения настроек BIOS. Это удобно для установки ОС с флешки, чтобы потом не возвращать порядок загрузки обратно.</text:p>
      <text:p text:style-name="P6"/>
      <text:p text:style-name="P6">Этап 4. Настройка аппаратных параметров</text:p>
      <text:p text:style-name="P6"/>
      <text:p text:style-name="P6">1. Перейдите в раздел Advanced (Расширенные настройки) или CPU Configuration.</text:p>
      <text:p text:style-name="P6">2. Найдите параметр Hyper-Threading Technology (для Intel) или SMT Mode (для AMD).</text:p>
      <text:p text:style-name="P6">3. Попробуйте отключить эту опцию, сохраните изменения и загрузитесь. Затем верните обратно.</text:p>
      <text:p text:style-name="P6">4. Вопрос: Что произойдёт с производительностью, если отключить Hyper-Threading?</text:p>
      <text:p text:style-name="P6"><text:s text:c="3"/>· Ответ: Процессор будет работать только с физическими ядрами, игнорируя виртуальные (логические). В многопоточных задачах производительность упадет примерно на 20–30%, но в некоторых старых играх может наблюдаться небольшой прирост FPS из-за лучшей оптимизации под физические ядра.</text:p>
      <text:p text:style-name="P6"/>
      <text:p text:style-name="P6">Этап 5. Работа с системой мониторинга (Hardware Monitor)</text:p>
      <text:p text:style-name="P6"/>
      <text:p text:style-name="P6">1. Перейдите в раздел PC Health Status или Hardware Monitor.</text:p>
      <text:p text:style-name="P6">2. Посмотрите текущие значения:</text:p>
      <text:p text:style-name="P6"><text:s text:c="3"/>· Температура процессора (CPU Temperature)</text:p>
      <text:p text:style-name="P6"><text:s text:c="3"/>· Скорость вращения кулера (CPU Fan Speed)</text:p>
      <text:p text:style-name="P6"><text:s text:c="3"/>· Напряжение по линиям (Vcore, +3.3V, +5V, +12V)</text:p>
      <text:p text:style-name="P6">3. Вопрос: Какие значения напряжения считаются критическими и сигнализируют о неисправности блока питания?</text:p>
      <text:p text:style-name="P6"><text:s text:c="3"/>· Ответ: Допустимые отклонения: ±5% от номинала. Для линии +12В допустимо 11.4–12.6В; для +5В — 4.75–5.25В; для +3.3В — 3.14–3.47В. Выход за эти пределы говорит о нестабильной работе БП.</text:p>
      <text:p text:style-name="P6"/>
      <text:p text:style-name="P6">Этап 6. Сброс настроек (Clear CMOS)</text:p>
      <text:p text:style-name="P6"/>
      <text:p text:style-name="P6">1. Найдите в BIOS пункт Load Optimized Defaults (Загрузить оптимизированные настройки) или Load Setup Defaults.</text:p>
      <text:p text:style-name="P6">2. В некоторых случаях требуется аппаратный сброс перемычкой на материнской плате.</text:p>
      <text:p text:style-name="P6">3. Вопрос: При каких ситуациях требуется аппаратный сброс (вытаскивание батарейки или перемычка), если сброс программно не работает?</text:p>
      <text:p text:style-name="P6"><text:s text:c="3"/>· Ответ: Если после изменения параметров (особенно частоты шины или напряжения) компьютер перестаёт включаться вообще (черный экран), <text:soft-page-break/>программный вход в BIOS недоступен. Тогда нужно обесточить ПК, извлечь батарейку CR2032 на 5–10 минут или замкнуть контакты Clear CMOS.</text:p>
      <text:p text:style-name="P6"/>
      <text:p text:style-name="P6">Этап 7. Диагностика неисправностей</text:p>
      <text:p text:style-name="P6"/>
      <text:p text:style-name="P6">1. При включении ПК раздаются звуковые сигналы (POST-коды).</text:p>
      <text:p text:style-name="P6">2. Запишите последовательность сигналов.</text:p>
      <text:p text:style-name="P6">3. Вопрос: Один длинный и два коротких сигнала POST — что это значит?</text:p>
      <text:p text:style-name="P6"><text:s text:c="3"/>· Ответ: Это указывает на проблему с видеокартой (для AMI BIOS) или с памятью (для Award BIOS). Точная расшифровка зависит от производителя BIOS, но в большинстве случаев это говорит о том, что видеокарта не прошла инициализацию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09:10:25.430649454</meta:creation-date>
    <dc:title>Default</dc:title>
    <meta:editing-cycles>2</meta:editing-cycles>
    <meta:editing-duration>PT9M26S</meta:editing-duration>
    <meta:generator>LibreOffice/7.5.6.2$Linux_X86_64 LibreOffice_project/50$Build-2</meta:generator>
    <dc:date>2026-06-18T09:19:51.106463524</dc:date>
    <meta:document-statistic meta:table-count="1" meta:image-count="0" meta:object-count="0" meta:page-count="3" meta:paragraph-count="57" meta:word-count="634" meta:character-count="4392" meta:non-whitespace-character-count="3778"/>
  </office:meta>
</office:document-meta>
</file>